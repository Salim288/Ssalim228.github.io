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fc6a" officeooo:paragraph-rsid="0003fc6a"/>
    </style:style>
    <style:style style:name="P2" style:family="paragraph" style:parent-style-name="Standard">
      <style:text-properties officeooo:rsid="0003fc6a" officeooo:paragraph-rsid="0003fc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BILAN : </text:p>
      <text:p text:style-name="P2"/>
      <text:p text:style-name="P2">La plus part des services mise en place et les configurations fonctionnait correctement.</text:p>
      <text:p text:style-name="P2">Au niveau de l’extralab le htacces fonctionnait mais l’authentification LDAP ne fonctionnait pas du to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18:54:28.551243800</meta:creation-date>
    <dc:date>2025-12-08T19:02:02.432997500</dc:date>
    <meta:editing-duration>PT7M34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" meta:word-count="31" meta:character-count="207" meta:non-whitespace-character-count="178"/>
  </office:meta>
</office:document-meta>
</file>